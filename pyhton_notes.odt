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300000163584C777C85B8AA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50f" officeooo:paragraph-rsid="0005b5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3 FOR VLSI</text:p>
      <text:p text:style-name="P1"/>
      <text:p text:style-name="P1">1. Reserved Keywords</text:p>
      <text:p text:style-name="P1"/>
      <text:p text:style-name="P1"><draw:frame draw:style-name="fr1" draw:name="Image1" text:anchor-type="char" svg:x="3.022cm" svg:y="0.122cm" svg:width="11.345cm" svg:height="3.283cm" draw:z-index="0"><draw:image xlink:href="Pictures/100000010000033300000163584C777C85B8AA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11:59:03.474137137</meta:creation-date>
    <dc:date>2026-06-01T13:42:02.126610302</dc:date>
    <meta:editing-duration>PT1H9M32S</meta:editing-duration>
    <meta:editing-cycles>1</meta:editing-cycles>
    <meta:document-statistic meta:table-count="0" meta:image-count="1" meta:object-count="0" meta:page-count="1" meta:paragraph-count="3" meta:word-count="7" meta:character-count="39" meta:non-whitespace-character-count="34"/>
    <meta:generator>LibreOffice/7.3.7.2$Linux_X86_64 LibreOffice_project/30$Build-2</meta:generator>
  </office:meta>
</office:document-meta>
</file>